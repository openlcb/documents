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310000006CF7F7BA2E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>
      <style:text-properties officeooo:rsid="001dc3d3" officeooo:paragraph-rsid="001dc3d3"/>
    </style:style>
    <style:style style:name="P3" style:family="paragraph" style:parent-style-name="Standard">
      <style:text-properties officeooo:rsid="0030efc8" officeooo:paragraph-rsid="0030efc8"/>
    </style:style>
    <style:style style:name="P4" style:family="paragraph" style:parent-style-name="Standard">
      <style:text-properties style:use-window-font-color="true" loext:opacity="0%" style:font-name="Times New Roman" fo:font-size="12pt" fo:language="en" fo:country="US" officeooo:rsid="0030efc8" officeooo:paragraph-rsid="0030efc8" style:font-name-asian="Times New Roman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text-properties style:use-window-font-color="true" loext:opacity="0%" style:font-name="Times New Roman" fo:font-size="12pt" fo:language="en" fo:country="US" officeooo:rsid="0046e3fb" officeooo:paragraph-rsid="0046e3fb" style:font-name-asian="Times New Roman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text-properties officeooo:rsid="001dc3d3" officeooo:paragraph-rsid="0035d4ad"/>
    </style:style>
    <style:style style:name="P7" style:family="paragraph" style:parent-style-name="Standard">
      <style:text-properties officeooo:rsid="0046e3fb" officeooo:paragraph-rsid="0046e3fb"/>
    </style:style>
    <style:style style:name="P8" style:family="paragraph" style:parent-style-name="Standard">
      <style:text-properties officeooo:rsid="0039143e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rsid="0055ca84" officeooo:paragraph-rsid="0055ca84"/>
    </style:style>
    <style:style style:name="P11" style:family="paragraph" style:parent-style-name="Standard">
      <style:text-properties style:use-window-font-color="true" loext:opacity="0%" style:font-name="Times New Roman" fo:font-size="12pt" fo:language="en" fo:country="US" officeooo:rsid="0055ca84" officeooo:paragraph-rsid="0055ca84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text-properties officeooo:paragraph-rsid="0055ca84"/>
    </style:style>
    <style:style style:name="P13" style:family="paragraph" style:parent-style-name="Standard" style:list-style-name="L2"/>
    <style:style style:name="P14" style:family="paragraph" style:parent-style-name="Standard" style:list-style-name="L2">
      <style:text-properties officeooo:paragraph-rsid="005689a1"/>
    </style:style>
    <style:style style:name="P15" style:family="paragraph" style:parent-style-name="Standard" style:list-style-name="L2">
      <style:text-properties officeooo:rsid="005689a1" officeooo:paragraph-rsid="005689a1"/>
    </style:style>
    <style:style style:name="P16" style:family="paragraph" style:parent-style-name="Standard">
      <style:text-properties officeooo:rsid="005689a1" officeooo:paragraph-rsid="005689a1"/>
    </style:style>
    <style:style style:name="P17" style:family="paragraph" style:parent-style-name="Standard">
      <style:paragraph-properties fo:margin-left="0.5in" fo:text-indent="0in" style:auto-text-indent="false"/>
      <style:text-properties officeooo:rsid="005689a1" officeooo:paragraph-rsid="005689a1"/>
    </style:style>
    <style:style style:name="P18" style:family="paragraph" style:parent-style-name="Standard">
      <style:paragraph-properties fo:margin-left="1in" fo:text-indent="0in" style:auto-text-indent="false"/>
      <style:text-properties officeooo:rsid="005689a1" officeooo:paragraph-rsid="005689a1"/>
    </style:style>
    <style:style style:name="P19" style:family="paragraph" style:parent-style-name="Standard">
      <style:text-properties officeooo:rsid="00201fa9" officeooo:paragraph-rsid="00201fa9"/>
    </style:style>
    <style:style style:name="P20" style:family="paragraph" style:parent-style-name="Standard">
      <style:text-properties officeooo:rsid="003ec74e" officeooo:paragraph-rsid="003ec74e"/>
    </style:style>
    <style:style style:name="P21" style:family="paragraph" style:parent-style-name="Standard">
      <style:text-properties officeooo:paragraph-rsid="003ec74e"/>
    </style:style>
    <style:style style:name="P22" style:family="paragraph" style:parent-style-name="Standard">
      <style:text-properties officeooo:rsid="003d7465" officeooo:paragraph-rsid="0051cf08"/>
    </style:style>
    <style:style style:name="P23" style:family="paragraph" style:parent-style-name="Standard">
      <style:text-properties officeooo:rsid="002a2c27" officeooo:paragraph-rsid="002a2c27"/>
    </style:style>
    <style:style style:name="P24" style:family="paragraph" style:parent-style-name="Standard">
      <style:text-properties officeooo:rsid="003d7465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9" style:family="paragraph">
      <style:paragraph-properties style:writing-mode="lr-tb"/>
      <style:text-properties fo:font-family="'Times New Roman'" style:font-family-generic="roman" fo:font-size="1pt" style:font-family-asian="'Times New Roman'" style:font-family-generic-asian="roman" style:font-family-complex="'Times New Roman'" style:font-family-generic-complex="roman"/>
    </style:style>
    <style:style style:name="P30" style:family="paragraph">
      <loext:graphic-properties draw:fill="solid" draw:fill-color="#c0c0c0" draw:opacity="50%"/>
      <style:paragraph-properties style:writing-mode="lr-tb"/>
      <style:text-properties fo:font-family="'Times New Roman'" style:font-family-generic="roman" fo:font-size="1pt" style:font-family-asian="'Times New Roman'" style:font-family-generic-asian="roman" style:font-family-complex="'Times New Roman'" style:font-family-generic-complex="roman"/>
    </style:style>
    <style:style style:name="T1" style:family="text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" style:family="text">
      <style:text-properties officeooo:rsid="002d248f"/>
    </style:style>
    <style:style style:name="T3" style:family="text">
      <style:text-properties style:use-window-font-color="true" loext:opacity="0%" style:font-name="Times New Roman" fo:font-size="12pt" fo:language="en" fo:country="US" officeooo:rsid="0051d4fe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loext:opacity="0%" style:font-name="Times New Roman" fo:font-size="12pt" fo:language="en" fo:country="US" officeooo:rsid="00474eec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n" fo:country="US" officeooo:rsid="004a1b0c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n" fo:country="US" officeooo:rsid="003070ac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n" fo:country="US" officeooo:rsid="0046e3fb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officeooo:rsid="004b566a"/>
    </style:style>
    <style:style style:name="T9" style:family="text">
      <style:text-properties officeooo:rsid="0046e3fb"/>
    </style:style>
    <style:style style:name="T10" style:family="text">
      <style:text-properties officeooo:rsid="00327d7a"/>
    </style:style>
    <style:style style:name="T11" style:family="text">
      <style:text-properties officeooo:rsid="0033a11a"/>
    </style:style>
    <style:style style:name="T12" style:family="text">
      <style:text-properties officeooo:rsid="004b8ce2"/>
    </style:style>
    <style:style style:name="T13" style:family="text">
      <style:text-properties style:use-window-font-color="true" loext:opacity="0%" style:font-name="Times New Roman" fo:font-size="12pt" fo:language="en" fo:country="US" officeooo:rsid="0031b27f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officeooo:rsid="0053a5a9"/>
    </style:style>
    <style:style style:name="T15" style:family="text">
      <style:text-properties officeooo:rsid="00372bf0"/>
    </style:style>
    <style:style style:name="T16" style:family="text">
      <style:text-properties style:use-window-font-color="true" loext:opacity="0%" style:font-name="Times New Roman" fo:font-size="12pt" fo:language="en" fo:country="US" officeooo:rsid="0035d4ad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loext:opacity="0%" style:font-name="Times New Roman" fo:font-size="12pt" fo:language="en" fo:country="US" officeooo:rsid="004d7c1f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officeooo:rsid="004e308c"/>
    </style:style>
    <style:style style:name="T19" style:family="text">
      <style:text-properties officeooo:rsid="003af59d"/>
    </style:style>
    <style:style style:name="T20" style:family="text">
      <style:text-properties officeooo:rsid="0027398d"/>
    </style:style>
    <style:style style:name="T21" style:family="text">
      <style:text-properties style:use-window-font-color="true" loext:opacity="0%" style:font-name="Times New Roman" fo:font-size="12pt" fo:language="en" fo:country="US" officeooo:rsid="0055ca84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loext:opacity="0%" style:font-name="Times New Roman" fo:font-size="12pt" fo:language="en" fo:country="US" officeooo:rsid="0028b33e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officeooo:rsid="005689a1"/>
    </style:style>
    <style:style style:name="T24" style:family="text">
      <style:text-properties officeooo:rsid="001dcbd5"/>
    </style:style>
    <style:style style:name="T25" style:family="text">
      <style:text-properties officeooo:rsid="001f5f3b"/>
    </style:style>
    <style:style style:name="T26" style:family="text">
      <style:text-properties officeooo:rsid="005769f0"/>
    </style:style>
    <style:style style:name="T27" style:family="text">
      <style:text-properties officeooo:rsid="005729a3"/>
    </style:style>
    <style:style style:name="T28" style:family="text">
      <style:text-properties officeooo:rsid="005f9830"/>
    </style:style>
    <style:style style:name="T29" style:family="text">
      <style:text-properties officeooo:rsid="003b7e45"/>
    </style:style>
    <style:style style:name="T30" style:family="text">
      <style:text-properties style:use-window-font-color="true" loext:opacity="0%" style:font-name="Times New Roman" fo:font-size="12pt" fo:language="en" fo:country="US" officeooo:rsid="003b7e45" style:font-name-asian="Times New Roman" style:font-size-asian="12pt" style:font-name-complex="Times New Roman" style:font-size-complex="12pt" style:language-complex="ar" style:country-complex="SA"/>
    </style:style>
    <style:style style:name="T31" style:family="text">
      <style:text-properties style:use-window-font-color="true" loext:opacity="0%" style:font-name="Times New Roman" fo:font-size="12pt" fo:language="en" fo:country="US" officeooo:rsid="0044f6b8" style:font-name-asian="Times New Roman" style:font-size-asian="12pt" style:font-name-complex="Times New Roman" style:font-size-complex="12pt" style:language-complex="ar" style:country-complex="SA"/>
    </style:style>
    <style:style style:name="T32" style:family="text">
      <style:text-properties style:use-window-font-color="true" loext:opacity="0%" style:font-name="Times New Roman" fo:font-size="12pt" fo:language="en" fo:country="US" officeooo:rsid="00424fb5" style:font-name-asian="Times New Roman" style:font-size-asian="12pt" style:font-name-complex="Times New Roman" style:font-size-complex="12pt" style:language-complex="ar" style:country-complex="SA"/>
    </style:style>
    <style:style style:name="T33" style:family="text">
      <style:text-properties style:use-window-font-color="true" loext:opacity="0%" style:font-name="Times New Roman" fo:font-size="12pt" fo:language="en" fo:country="US" officeooo:rsid="00508b08" style:font-name-asian="Times New Roman" style:font-size-asian="12pt" style:font-name-complex="Times New Roman" style:font-size-complex="12pt" style:language-complex="ar" style:country-complex="SA"/>
    </style:style>
    <style:style style:name="T34" style:family="text">
      <style:text-properties style:use-window-font-color="true" loext:opacity="0%" style:font-name="Times New Roman" fo:font-size="12pt" fo:language="en" fo:country="US" officeooo:rsid="00444ca8" style:font-name-asian="Times New Roman" style:font-size-asian="12pt" style:font-name-complex="Times New Roman" style:font-size-complex="12pt" style:language-complex="ar" style:country-complex="SA"/>
    </style:style>
    <style:style style:name="T35" style:family="text">
      <style:text-properties officeooo:rsid="0051cf08"/>
    </style:style>
    <style:style style:name="T36" style:family="text">
      <style:text-properties officeooo:rsid="00201fa9"/>
    </style:style>
    <style:style style:name="T37" style:family="text">
      <style:text-properties officeooo:rsid="0021a7aa"/>
    </style:style>
    <style:style style:name="T38" style:family="text">
      <style:text-properties officeooo:rsid="0023b73d"/>
    </style:style>
    <style:style style:name="T39" style:family="text">
      <style:text-properties style:use-window-font-color="true" loext:opacity="0%" style:font-name="Times New Roman" fo:font-size="12pt" fo:language="en" fo:country="US" officeooo:rsid="0023b73d" style:font-name-asian="Times New Roman" style:font-size-asian="12pt" style:font-name-complex="Times New Roman" style:font-size-complex="12pt" style:language-complex="ar" style:country-complex="SA"/>
    </style:style>
    <style:style style:name="T40" style:family="text">
      <style:text-properties fo:font-family="'Times New Roman'" style:font-family-generic="roman" fo:font-size="1pt" style:font-family-asian="'Times New Roman'" style:font-family-generic-asian="roman" style:font-family-complex="'Times New Roman'" style:font-family-generic-complex="roma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style:writing-mode="lr-tb" loext:decorative="false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5582988992" text:id="ct15582988992">
          <text:deletion>
            <office:change-info>
              <dc:creator>Bob Jacobsen</dc:creator>
              <dc:date>2026-02-22T12:45:25</dc:date>
            </office:change-info>
            <text:p text:style-name="P16">An address of 0x3800 (short address 0) represents “unknown”.</text:p>
          </text:deletion>
        </text:changed-region>
        <text:changed-region xml:id="ct15583037152" text:id="ct15583037152">
          <text:insertion>
            <office:change-info>
              <dc:creator>Bob Jacobsen</dc:creator>
              <dc:date>2026-02-22T12:45:25</dc:date>
            </office:change-info>
          </text:insertion>
        </text:changed-region>
        <text:changed-region xml:id="ct13861119200" text:id="ct13861119200">
          <text:deletion>
            <office:change-info>
              <dc:creator>Bob Jacobsen</dc:creator>
              <dc:date>2026-02-22T12:45:37</dc:date>
            </office:change-info>
            <text:p text:style-name="P16"><text:span text:style-name="T27">unknown</text:span></text:p>
          </text:deletion>
        </text:changed-region>
        <text:changed-region xml:id="ct15582963776" text:id="ct15582963776">
          <text:insertion>
            <office:change-info>
              <dc:creator>Bob Jacobsen</dc:creator>
              <dc:date>2026-02-22T12:45:37</dc:date>
            </office:change-info>
          </text:insertion>
        </text:changed-region>
        <text:changed-region xml:id="ct15583053696" text:id="ct15583053696">
          <text:insertion>
            <office:change-info>
              <dc:creator>Bob Jacobsen</dc:creator>
              <dc:date>2026-02-22T12:45:4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970_42232234"/>Introduction<text:bookmark-end text:name="__RefHeading___Toc1970_42232234"/></text:h>
      <text:p text:style-name="Standard">A Working Note is an intermediate step in <text:span text:style-name="T1">the</text:span> documentation process. <text:s/>It gathers together the content from various informal development <text:span text:style-name="T1">documents</text:span>, discussions, etc into a single place. <text:s/>One or more Working Notes form the basic for the next step, which is one or more Standard/TechNote pairs.</text:p>
      <text:p text:style-name="P2">T<text:span text:style-name="T1">h</text:span>is working note describes a <text:span text:style-name="T2">OpenLCB </text:span>protocol for a <text:span text:style-name="T3">detector</text:span><text:span text:style-name="T1"> to report its detection of a </text:span><text:span text:style-name="T4">train, including the DCC address of an associated </text:span><text:span text:style-name="T1">DCC decoder.</text:span></text:p>
      <text:p text:style-name="P2"><text:span text:style-name="T1">“</text:span><text:span text:style-name="T5">Detector</text:span><text:span text:style-name="T6">” refers to a fixed-location electronic device that can interact with a DCC decoder to ascertain the address of the DCC decoder while the decoder is in a specific area or at a specific point. </text:span><text:span text:style-name="T7">Possible implementations include but are not limited to RailCom detectors, Digitrax detectors, RFID and QR readers.</text:span></text:p>
      <text:h text:style-name="Heading_20_2" text:outline-level="2"><text:bookmark-start text:name="__RefHeading___Toc1972_42232234"/>Served Use Cases<text:bookmark-end text:name="__RefHeading___Toc1972_42232234"/></text:h>
      <text:p text:style-name="P3">A train enters a current-detected block. <text:s/>A <text:span text:style-name="T8">detector</text:span> recognizes this, <text:span text:style-name="T9">successfully </text:span>queries the decoder for its address, and reports that <text:span text:style-name="T9">information</text:span> on the OpenLCB bus. <text:span text:style-name="T10">That information results in a signal </text:span><text:span text:style-name="T11">controller</text:span><text:span text:style-name="T10"> sending a speed command such as Slow or Stop to that particular detector.</text:span></text:p>
      <text:p text:style-name="P3">A train crosses an RFID <text:span text:style-name="T12">reader</text:span> which determines the train<text:span text:style-name="T1">’s DCC address and reports that address on the </text:span><text:span text:style-name="T13">OpenLCB bus</text:span><text:span text:style-name="T1">. </text:span></text:p>
      <text:p text:style-name="P4">A train exits a current-detected block. A detector recognizes this, and reports that interaction on the OpenLCB bus.</text:p>
      <text:p text:style-name="P5">A train enters a current detected block. A detector recognizes this, and attempts unsuccessfully to query the decoder for its address. <text:s/>The detector <text:span text:style-name="T14">emits a report without decoder address information.</text:span></text:p>
      <text:h text:style-name="Heading_20_2" text:outline-level="2"><text:bookmark-start text:name="__RefHeading___Toc1974_42232234"/>Unserved Use Cases<text:bookmark-end text:name="__RefHeading___Toc1974_42232234"/></text:h>
      <text:p text:style-name="P2"><text:span text:style-name="T15">Being able to report information on a native OpenLCB (non-DCC) train is an unserved use case. </text:span>This protocol doesn<text:span text:style-name="T1">’t provide a way to report the Unique ID of a fully OpenLCB train. <text:s/>All devices being reported need to have a DCC address.</text:span></text:p>
      <text:p text:style-name="P6"><text:span text:style-name="T16">Having a monitor </text:span><text:span text:style-name="T7">tool </text:span><text:span text:style-name="T16">that can show all detection information without configuration is a unserved use case. </text:span><text:span text:style-name="T1">The Unique IDs of the </text:span><text:span text:style-name="T17">detectors</text:span><text:span text:style-name="T1">, hence the upper bytes of Event IDs to be consumed, are determined by a pre-configuration process in the consumer. <text:s/>They can’t be determined automatically. </text:span></text:p>
      <text:h text:style-name="Heading_20_1" text:outline-level="1"><text:bookmark-start text:name="__RefHeading___Toc1976_42232234"/><text:soft-page-break/>Specified Sections<text:bookmark-end text:name="__RefHeading___Toc1976_42232234"/></text:h>
      <text:p text:style-name="Standard">This is the usual section organization for a Technical Note, to accumulate the Standard and Technical Note content in its eventual order.</text:p>
      <text:h text:style-name="Heading_20_2" text:outline-level="2"><text:bookmark-start text:name="__RefHeading___Toc1978_42232234"/>Introduction<text:bookmark-end text:name="__RefHeading___Toc1978_42232234"/></text:h>
      <text:p text:style-name="Standard">Note that this section of the Standard is informative, not normative.</text:p>
      <text:h text:style-name="Heading_20_2" text:outline-level="2"><text:bookmark-start text:name="__RefHeading___Toc1980_42232234"/>Intended Use<text:bookmark-end text:name="__RefHeading___Toc1980_42232234"/></text:h>
      <text:p text:style-name="Standard">Note that this section of the Standard is informative, not normative.</text:p>
      <text:p text:style-name="P7">This protocol is intended to provide a standard way to transfer <text:span text:style-name="T18">train</text:span> location and <text:span text:style-name="T18">DCC decoder </text:span>identification information on OpenLCB DCC layouts.</text:p>
      <text:h text:style-name="Heading_20_2" text:outline-level="2"><text:bookmark-start text:name="__RefHeading___Toc1982_42232234"/>Reference and Context<text:bookmark-end text:name="__RefHeading___Toc1982_42232234"/></text:h>
      <text:p text:style-name="P8">This protocol builds on the Event Transport Protocol as defined by that Standard and Technical Note.</text:p>
      <text:h text:style-name="Heading_20_2" text:outline-level="2"><text:bookmark-start text:name="__RefHeading___Toc1984_42232234"/>Message Formats<text:bookmark-end text:name="__RefHeading___Toc1984_42232234"/></text:h>
      <text:p text:style-name="Standard"><text:span text:style-name="T19">Detection events are produced via PCER messages with an </text:span>Event ID <text:span text:style-name="T19">which </text:span><text:span text:style-name="T20">contains</text:span> </text:p>
      <text:list text:style-name="L1">
        <text:list-item>
          <text:p text:style-name="P9">6 byte unique ID of the <text:span text:style-name="T18">detector</text:span>,</text:p>
        </text:list-item>
        <text:list-item>
          <text:p text:style-name="P10">Two bits to represent entry/exit and forward/reverse. <text:s/>T<text:span text:style-name="T1">hese are coded:</text:span></text:p>
        </text:list-item>
      </text:list>
      <text:p text:style-name="P11"><text:tab/><text:tab/>0b00<text:tab/>unoccupied, ie exit</text:p>
      <text:p text:style-name="P11"><text:tab/><text:tab/>0b01<text:tab/>occupied, forward, ie entry</text:p>
      <text:p text:style-name="P11"><text:tab/><text:tab/>0b10<text:tab/>occupied, reverse, ie entry</text:p>
      <text:p text:style-name="P12"><text:span text:style-name="T21"><text:tab/><text:tab/>0b11 <text:tab/>occupied, direction unknown, ie entry</text:span><text:span text:style-name="T22"/></text:p>
      <text:list text:continue-numbering="true" text:style-name="L1">
        <text:list-item>
          <text:p text:style-name="P9">14 bits of DCC address</text:p>
        </text:list-item>
      </text:list>
      <text:list text:style-name="L2">
        <text:list-item>
          <text:list>
            <text:list-item>
              <text:p text:style-name="P13">If the high bits are 0x<text:span text:style-name="T23">3</text:span>8 this represents a DCC short address</text:p>
            </text:list-item>
            <text:list-item>
              <text:p text:style-name="P14"><text:span text:style-name="T24">I</text:span>f the high bits are 0x<text:span text:style-name="T23">3</text:span>9 this represents a DCC consist address</text:p>
            </text:list-item>
            <text:list-item>
              <text:p text:style-name="P15"><text:change text:change-id="ct15582988992"/><text:change-start text:change-id="ct15583037152"/>An address of 0x3800 (short address 0) represents that the track is empty, i.e. there is no detector present.<text:change-end text:change-id="ct15583037152"/></text:p>
            </text:list-item>
            <text:list-item>
              <text:p text:style-name="P13"><text:span text:style-name="T25">O</text:span>therwise it’s a DCC long address</text:p>
            </text:list-item>
          </text:list>
        </text:list-item>
      </text:list>
      <text:p text:style-name="P16">The encoding of DCC addresses into 14 bits follow<text:span text:style-name="T26">s</text:span> the S-9.2.1.1 and RCN-218 standard<text:span text:style-name="T26">s.</text:span></text:p>
      <text:p text:style-name="P16"><text:span text:style-name="T27">The 0x3800 value is used for </text:span><text:change text:change-id="ct13861119200"/><text:change-start text:change-id="ct15582963776"/><text:span text:style-name="T28">track empty</text:span><text:change-end text:change-id="ct15582963776"/><text:span text:style-name="T27"> </text:span>instead of 0x0000 because <text:span text:style-name="T27">0x0000 is</text:span> long address zero, which is a valid (though uncommon) long address.<text:change-start text:change-id="ct15583053696"/></text:p>
      <text:p text:style-name="P17">A detector may, but does not have to, use the 0x3800 “track is empty” by for example producing a “'track is empty' leaves” event when the track becomes occupied, and a “‘track is empty arrives” when the track becomes unoccupied. <text:s/>For example:</text:p>
      <text:p text:style-name="P16"><text:soft-page-break/></text:p>
      <text:p text:style-name="P18">06.80.99.30.03.50.38.00 - "track is empty” leaves</text:p>
      <text:p text:style-name="P18">06.80.99.30.03.50.F8.03 - 3S arrives</text:p>
      <text:p text:style-name="P18">06.80.99.30.03.50.38.03 - 3S leaves</text:p>
      <text:p text:style-name="P18">06.80.99.30.03.50.F8.00 - "track is empty" arrives<text:change-end text:change-id="ct15583053696"/></text:p>
      <text:h text:style-name="Heading_20_2" text:outline-level="2"><text:bookmark-start text:name="__RefHeading___Toc1986_42232234"/>States<text:bookmark-end text:name="__RefHeading___Toc1986_42232234"/></text:h>
      <text:p text:style-name="P19">This protocol has no states <text:span text:style-name="T29">of it</text:span><text:span text:style-name="T30">s own.</text:span></text:p>
      <text:p text:style-name="P20"><text:span text:style-name="T31">A</text:span><text:span text:style-name="T1">n “exit Event ID can be sent at most once after a corresponding entry Event ID” state requirement </text:span><text:span text:style-name="T31">was discussed but not accepted.</text:span><text:span text:style-name="T1"> </text:span><text:span text:style-name="T32">Note that some hardware </text:span><text:span text:style-name="T33">detectors</text:span><text:span text:style-name="T32"> determine only that a decoder has left the monitored section, not its address, so th</text:span><text:span text:style-name="T34">ose</text:span><text:span text:style-name="T32"> scanner</text:span><text:span text:style-name="T34">s</text:span><text:span text:style-name="T32"> will be producing “NNN entry” followed by “(none) exit”. </text:span></text:p>
      <text:h text:style-name="Heading_20_2" text:outline-level="2"><text:bookmark-start text:name="__RefHeading___Toc1988_42232234"/>Interactions<text:bookmark-end text:name="__RefHeading___Toc1988_42232234"/></text:h>
      <text:p text:style-name="P21">A <text:span text:style-name="T35">detector</text:span> sends a PCER <text:span text:style-name="T36">with an Event ID as described above </text:span>when it detects entry of a decoder <text:span text:style-name="T37">into the monitored location</text:span>. It may also send a PCER when the exit of the decoder <text:span text:style-name="T37">from the monitored location is detected</text:span>.</text:p>
      <text:p text:style-name="P22">A <text:span text:style-name="T35">detector</text:span>, acting as a producer, must reply to Verify Events and Identify Producers messages with the appropriate event(s) or range.</text:p>
      <text:p text:style-name="Standard">Consumers can consume the entire 16-bit range of the lower EventID bytes. Or they can consume just the specific EventIDs that correspond to the particular decoder(s) that they’re tracking. <text:s/><text:span text:style-name="T38">In either case, they must respond to Verify Events and Identify Consumers messages with the </text:span><text:span text:style-name="T39">appropriate</text:span><text:span text:style-name="T38"> event(s) or range.</text:span></text:p>
      <text:p text:style-name="P23">There is no PIP bit allocated to this protocol.</text:p>
      <text:h text:style-name="Heading_20_1" text:outline-level="1"><text:bookmark-start text:name="__RefHeading___Toc1990_42232234"/>Background Information<text:bookmark-end text:name="__RefHeading___Toc1990_42232234"/></text:h>
      <text:p text:style-name="P24">This protocol has been implemented in several products. It is known to work for its served use cases.</text:p>
      <text:p text:style-name="P2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6"><text:s/>1 Introduction<text:tab/>1</text:p>
          <text:p text:style-name="P27"><text:s/>1.1 Served Use Cases<text:tab/>1</text:p>
          <text:p text:style-name="P27"><text:s/>1.2 Unserved Use Cases<text:tab/>1</text:p>
          <text:p text:style-name="P26"><text:s/>2 Specified Sections<text:tab/>2</text:p>
          <text:p text:style-name="P27"><text:s/>2.1 Introduction<text:tab/>2</text:p>
          <text:p text:style-name="P27"><text:s/>2.2 Intended Use<text:tab/>2</text:p>
          <text:p text:style-name="P27"><text:s/>2.3 Reference and Context<text:tab/>2</text:p>
          <text:p text:style-name="P27"><text:s/>2.4 Message Formats<text:tab/>2</text:p>
          <text:p text:style-name="P27"><text:s/>2.5 States<text:tab/>3</text:p>
          <text:p text:style-name="P27"><text:s/>2.6 Interactions<text:tab/>3</text:p>
          <text:p text:style-name="P26"><text:s/>3 Background Information<text:tab/>3</text:p>
        </text:index-body>
      </text:table-of-content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chapter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hyphenation-keep="auto" loext:hyphenation-keep-type="column" loext:hyphenation-keep-line="false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9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fo:font-family="'Times New Roman'" style:font-family-generic="roman" fo:font-size="1pt" style:font-family-asian="'Times New Roman'" style:font-family-generic-asian="roman" style:font-family-complex="'Times New Roman'" style:font-family-generic-complex="roman"/>
    </style:style>
    <style:style style:name="MP3" style:family="paragraph">
      <loext:graphic-properties draw:fill="solid" draw:fill-color="#c0c0c0" draw:opacity="50%"/>
      <style:paragraph-properties style:writing-mode="lr-tb"/>
      <style:text-properties fo:font-family="'Times New Roman'" style:font-family-generic="roman" fo:font-size="1pt" style:font-family-asian="'Times New Roman'" style:font-family-generic-asian="roman" style:font-family-complex="'Times New Roman'" style:font-family-generic-complex="roman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cf330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bc89c"/>
    </style:style>
    <style:style style:name="MT1" style:family="text">
      <style:text-properties fo:font-family="'Times New Roman'" style:font-family-generic="roman" fo:font-size="1pt" style:font-family-asian="'Times New Roman'" style:font-family-generic-asian="roman" style:font-family-complex="'Times New Roman'" style:font-family-generic-complex="roman"/>
    </style:style>
    <style:style style:name="MT2" style:family="text">
      <style:text-properties officeooo:rsid="002ed543"/>
    </style:style>
    <style:style style:name="MT3" style:family="text">
      <style:text-properties fo:font-size="8pt" officeooo:rsid="0016888d" style:font-size-asian="8pt" style:font-size-complex="8pt"/>
    </style:style>
    <style:style style:name="MT4" style:family="text">
      <style:text-properties fo:font-size="8pt" officeooo:rsid="005dc9f0" style:font-size-asian="8pt" style:font-size-complex="8pt"/>
    </style:style>
    <style:style style:name="MT5" style:family="text">
      <style:text-properties fo:font-size="8pt" officeooo:rsid="002091d6" style:font-size-asian="8pt" style:font-size-complex="8pt"/>
    </style:style>
    <style:style style:name="MT6" style:family="text">
      <style:text-properties fo:font-size="8pt" style:font-size-asian="8pt" style:font-size-complex="8pt"/>
    </style:style>
    <style:style style:name="MT7" style:family="text">
      <style:text-properties style:use-window-font-color="true" loext:opacity="0%" fo:language="en" fo:country="US" officeooo:rsid="00474eec" style:font-name-asian="Times New Roman" style:font-name-complex="Times New Roman" style:language-complex="ar" style:country-complex="SA"/>
    </style:style>
    <style:style style:name="MT8" style:family="text">
      <style:text-properties fo:font-size="8pt" officeooo:rsid="00474eec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style:writing-mode="lr-tb" loext:decorative="false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draw:custom-shape text:anchor-type="char" draw:z-index="3" draw:name="PowerPlusWaterMarkObject3" draw:style-name="Mgr1" draw:text-style-name="MP3" svg:width="6.5461in" svg:height="2.6185in" draw:transform="skewX (-3.96283075457201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OpenLCB <text:span text:style-name="MT2">Transponding</text:span> <text:span text:style-name="MT2">Protocol</text:span> Working Note</text:p>
      </style:header>
      <style:footer>
        <text:tracked-changes>
          <text:changed-region xml:id="ct15462542592" text:id="ct15462542592">
            <text:insertion>
              <office:change-info>
                <dc:creator>Bob Jacobsen</dc:creator>
                <dc:date>2023-09-08T10:30:12</dc:date>
              </office:change-info>
            </text:insertion>
          </text:changed-region>
          <text:changed-region xml:id="ct15462542288" text:id="ct15462542288">
            <text:deletion>
              <office:change-info>
                <dc:creator>Bob Jacobsen</dc:creator>
                <dc:date>2023-09-08T10:30:17</dc:date>
              </office:change-info>
              <text:p text:style-name="MP4"><text:span text:style-name="Page_20_Number"><text:span text:style-name="MT3"><text:user-defined style:data-style-name="N0" text:name="OLCByear"/></text:span></text:span></text:p>
            </text:deletion>
          </text:changed-region>
        </text:tracked-changes>
        <text:p text:style-name="MP4"><text:span text:style-name="Page_20_Number"><text:span text:style-name="MT3">Copyright 2011-</text:span></text:span><text:change-start text:change-id="ct15462542592"/><text:span text:style-name="Page_20_Number"><text:span text:style-name="MT4">2023</text:span></text:span><text:change-end text:change-id="ct15462542592"/><text:change text:change-id="ct15462542288"/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5"><text:tab/>Page </text:span></text:span><text:span text:style-name="Page_20_Number"><text:span text:style-name="MT5"><text:page-number text:select-page="current">4</text:page-number></text:span></text:span><text:span text:style-name="Page_20_Number"><text:span text:style-name="MT5"><text:s/>of </text:span></text:span><text:span text:style-name="Page_20_Number"><text:span text:style-name="MT5"><text:page-count style:num-format="1">4</text:page-count></text:span></text:span><text:span text:style-name="Page_20_Number"><text:span text:style-name="MT5"><text:s/>- </text:span></text:span><text:span text:style-name="Page_20_Number"><text:span text:style-name="MT6"><text:date style:data-style-name="N40" text:date-value="2026-02-22T12:47:48.555507995">Feb 22, 2026</text:date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3.96283075457201E-017) rotate (0.785398163397448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F7F7BA2E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Working Not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7">DCC Detection</text:span><text:span text:style-name="MT2"> Protocol</text:span>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40" text:date-value="2026-02-22T12:47:48.556457245">Feb 22, 2026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3">Copyright 2011-</text:span></text:span><text:span text:style-name="Page_20_Number"><text:span text:style-name="MT8">2023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5"><text:tab/>Page </text:span></text:span><text:span text:style-name="Page_20_Number"><text:span text:style-name="MT5"><text:page-number text:select-page="current">1</text:page-number></text:span></text:span><text:span text:style-name="Page_20_Number"><text:span text:style-name="MT5"><text:s/>of </text:span></text:span><text:span text:style-name="Page_20_Number"><text:span text:style-name="MT5"><text:page-count style:num-format="1">4</text:page-count></text:span></text:span><text:span text:style-name="Page_20_Number"><text:span text:style-name="MT5"><text:s/>- </text:span></text:span><text:span text:style-name="Page_20_Number"><text:span text:style-name="MT6"><text:date style:data-style-name="N40" text:date-value="2026-02-22T12:47:48.557139951">Feb 22, 2026</text:date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OpenLCB Technical Note</dc:title>
    <meta:initial-creator>Alex Shepherd</meta:initial-creator>
    <meta:creation-date>2009-01-22T07:11:27</meta:creation-date>
    <meta:editing-cycles>138</meta:editing-cycles>
    <meta:editing-duration>P1DT54M22S</meta:editing-duration>
    <meta:generator>LibreOffice/25.8.3.2$MacOSX_AARCH64 LibreOffice_project/8ca8d55c161d602844f5428fa4b58097424e324e</meta:generator>
    <dc:date>2026-02-22T12:47:48.481099000</dc:date>
    <dc:creator>Bob Jacobsen</dc:creator>
    <meta:document-statistic meta:table-count="1" meta:image-count="1" meta:object-count="0" meta:page-count="4" meta:paragraph-count="70" meta:word-count="978" meta:character-count="6042" meta:non-whitespace-character-count="5097"/>
    <meta:user-defined meta:name="Info 1"/>
    <meta:user-defined meta:name="Info 2"/>
    <meta:user-defined meta:name="Info 3"/>
    <meta:user-defined meta:name="Info 4"/>
  </office:meta>
</office:document-meta>
</file>